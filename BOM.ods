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807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7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erif" style:font-name-asian="DejaVu Sans" style:font-name-complex="DejaVu Sans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uantity needed</text:p>
          </table:table-cell>
          <table:table-cell office:value-type="string" calcext:value-type="string">
            <text:p>MOQ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 to ord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2450AT43F0100001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034" calcext:value-type="float">
            <text:p>1.1034</text:p>
          </table:table-cell>
          <table:table-cell table:formula="of:=MAX([.B2];[.C2])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www.lcsc.com/product-detail/C17192881.html" xlink:type="simple">https://www.lcsc.com/product-detail/C17192881.html</text:a></text:p>
          </table:table-cell>
          <table:table-cell table:formula="of:=[.E2]*[.D2]" office:value-type="float" office:value="1.1034" calcext:value-type="float">
            <text:p>1.1034</text:p>
          </table:table-cell>
        </table:table-row>
        <table:table-row table:style-name="ro1">
          <table:table-cell office:value-type="string" calcext:value-type="string">
            <text:p>32.768k cryst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553" calcext:value-type="float">
            <text:p>0.2553</text:p>
          </table:table-cell>
          <table:table-cell table:formula="of:=MAX([.B3];[.C3])"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www.lcsc.com/product-detail/C46257428.html" xlink:type="simple">https://www.lcsc.com/product-detail/C46257428.html</text:a></text:p>
          </table:table-cell>
          <table:table-cell table:formula="of:=[.E3]*[.D3]" office:value-type="float" office:value="1.2765" calcext:value-type="float">
            <text:p>1.2765</text:p>
          </table:table-cell>
        </table:table-row>
        <table:table-row table:style-name="ro1">
          <table:table-cell office:value-type="string" calcext:value-type="string">
            <text:p>32M crysta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64" calcext:value-type="float">
            <text:p>0.0564</text:p>
          </table:table-cell>
          <table:table-cell table:formula="of:=MAX([.B4];[.C4])" office:value-type="float" office:value="10" calcext:value-type="float">
            <text:p>10</text:p>
          </table:table-cell>
          <table:table-cell office:value-type="string" calcext:value-type="string">
            <text:p><text:a xlink:href="https://www.lcsc.com/product-detail/C42464320.html" xlink:type="simple">https://www.lcsc.com/product-detail/C42464320.html</text:a></text:p>
          </table:table-cell>
          <table:table-cell table:formula="of:=[.E4]*[.D4]"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1pF cap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85" calcext:value-type="float">
            <text:p>0.0085</text:p>
          </table:table-cell>
          <table:table-cell table:formula="of:=MAX([.B5];[.C5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5137611.html" xlink:type="simple">https://www.lcsc.com/product-detail/C5137611.html</text:a></text:p>
          </table:table-cell>
          <table:table-cell table:formula="of:=[.E5]*[.D5]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1.2pF cap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38" calcext:value-type="float">
            <text:p>0.0038</text:p>
          </table:table-cell>
          <table:table-cell table:formula="of:=MAX([.B6];[.C6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1638.html" xlink:type="simple">https://www.lcsc.com/product-detail/C1638.html</text:a></text:p>
          </table:table-cell>
          <table:table-cell table:formula="of:=[.E6]*[.D6]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20pF cap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89" calcext:value-type="float">
            <text:p>0.0089</text:p>
          </table:table-cell>
          <table:table-cell table:formula="of:=MAX([.B7];[.C7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5137583.html" xlink:type="simple">https://www.lcsc.com/product-detail/C5137583.html</text:a></text:p>
          </table:table-cell>
          <table:table-cell table:formula="of:=[.E7]*[.D7]"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10uF cap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83" calcext:value-type="float">
            <text:p>0.083</text:p>
          </table:table-cell>
          <table:table-cell table:formula="of:=MAX([.B8];[.C8])" office:value-type="float" office:value="50" calcext:value-type="float">
            <text:p>50</text:p>
          </table:table-cell>
          <table:table-cell office:value-type="string" calcext:value-type="string">
            <text:p><text:a xlink:href="https://www.lcsc.com/product-detail/C1691.html" xlink:type="simple">https://www.lcsc.com/product-detail/C1691.html</text:a></text:p>
          </table:table-cell>
          <table:table-cell table:formula="of:=[.E8]*[.D8]"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1uF ca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217" calcext:value-type="float">
            <text:p>0.0217</text:p>
          </table:table-cell>
          <table:table-cell table:formula="of:=MAX([.B9];[.C9])" office:value-type="float" office:value="50" calcext:value-type="float">
            <text:p>50</text:p>
          </table:table-cell>
          <table:table-cell office:value-type="string" calcext:value-type="string">
            <text:p><text:a xlink:href="https://www.lcsc.com/product-detail/C29936.html" xlink:type="simple">https://www.lcsc.com/product-detail/C29936.html</text:a></text:p>
          </table:table-cell>
          <table:table-cell table:formula="of:=[.E9]*[.D9]" office:value-type="float" office:value="1.085" calcext:value-type="float">
            <text:p>1.085</text:p>
          </table:table-cell>
        </table:table-row>
        <table:table-row table:style-name="ro1">
          <table:table-cell office:value-type="string" calcext:value-type="string">
            <text:p>100pF cap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174" calcext:value-type="float">
            <text:p>0.0174</text:p>
          </table:table-cell>
          <table:table-cell table:formula="of:=MAX([.B10];[.C10])" office:value-type="float" office:value="50" calcext:value-type="float">
            <text:p>50</text:p>
          </table:table-cell>
          <table:table-cell office:value-type="string" calcext:value-type="string">
            <text:p><text:a xlink:href="https://www.lcsc.com/product-detail/C576846.html" xlink:type="simple">https://www.lcsc.com/product-detail/C576846.html</text:a></text:p>
          </table:table-cell>
          <table:table-cell table:formula="of:=[.E10]*[.D10]"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47nF cap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77" calcext:value-type="float">
            <text:p>0.0077</text:p>
          </table:table-cell>
          <table:table-cell table:formula="of:=MAX([.B11];[.C11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576852.html" xlink:type="simple">https://www.lcsc.com/product-detail/C576852.html</text:a></text:p>
          </table:table-cell>
          <table:table-cell table:formula="of:=[.E11]*[.D11]"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100nF ca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179" calcext:value-type="float">
            <text:p>0.0179</text:p>
          </table:table-cell>
          <table:table-cell table:formula="of:=MAX([.B12];[.C12])" office:value-type="float" office:value="50" calcext:value-type="float">
            <text:p>50</text:p>
          </table:table-cell>
          <table:table-cell office:value-type="string" calcext:value-type="string">
            <text:p><text:a xlink:href="https://www.lcsc.com/product-detail/C5137636.html" xlink:type="simple">https://www.lcsc.com/product-detail/C5137636.html</text:a></text:p>
          </table:table-cell>
          <table:table-cell table:formula="of:=[.E12]*[.D12]" office:value-type="float" office:value="0.895" calcext:value-type="float">
            <text:p>0.895</text:p>
          </table:table-cell>
        </table:table-row>
        <table:table-row table:style-name="ro1">
          <table:table-cell office:value-type="string" calcext:value-type="string">
            <text:p>100uF ca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214" calcext:value-type="float">
            <text:p>0.3214</text:p>
          </table:table-cell>
          <table:table-cell table:formula="of:=MAX([.B13];[.C13])" office:value-type="float" office:value="5" calcext:value-type="float">
            <text:p>5</text:p>
          </table:table-cell>
          <table:table-cell office:value-type="string" calcext:value-type="string">
            <text:p><text:a xlink:href="https://www.lcsc.com/product-detail/C521072.html" xlink:type="simple">https://www.lcsc.com/product-detail/C521072.html</text:a></text:p>
          </table:table-cell>
          <table:table-cell table:formula="of:=[.E13]*[.D13]" office:value-type="float" office:value="1.607" calcext:value-type="float">
            <text:p>1.607</text:p>
          </table:table-cell>
        </table:table-row>
        <table:table-row table:style-name="ro1">
          <table:table-cell office:value-type="string" calcext:value-type="string">
            <text:p>1nF cap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49" calcext:value-type="float">
            <text:p>0.0049</text:p>
          </table:table-cell>
          <table:table-cell table:formula="of:=MAX([.B14];[.C14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17702741.html" xlink:type="simple">https://www.lcsc.com/product-detail/C17702741.html</text:a></text:p>
          </table:table-cell>
          <table:table-cell table:formula="of:=[.E14]*[.D14]"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10pF ca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59" calcext:value-type="float">
            <text:p>0.0059</text:p>
          </table:table-cell>
          <table:table-cell table:formula="of:=MAX([.B15];[.C15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1634.html" xlink:type="simple">https://www.lcsc.com/product-detail/C1634.html</text:a></text:p>
          </table:table-cell>
          <table:table-cell table:formula="of:=[.E15]*[.D15]"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Green 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table:formula="of:=MAX([.B16];[.C16])" office:value-type="float" office:value="1" calcext:value-type="float">
            <text:p>1</text:p>
          </table:table-cell>
          <table:table-cell office:value-type="string" calcext:value-type="string">
            <text:p>https://www.digikey.com/en/products/detail/sunled/XZVG53W-8/4745971</text:p>
          </table:table-cell>
          <table:table-cell table:formula="of:=[.E16]*[.D16]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Red 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table:formula="of:=MAX([.B17];[.C17])" office:value-type="float" office:value="1" calcext:value-type="float">
            <text:p>1</text:p>
          </table:table-cell>
          <table:table-cell office:value-type="string" calcext:value-type="string">
            <text:p>https://www.digikey.com/en/products/detail/sunled/XZMDK53W-8/4745952</text:p>
          </table:table-cell>
          <table:table-cell table:formula="of:=[.E17]*[.D17]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112" calcext:value-type="float">
            <text:p>0.0112</text:p>
          </table:table-cell>
          <table:table-cell table:formula="of:=MAX([.B18];[.C18])" office:value-type="float" office:value="50" calcext:value-type="float">
            <text:p>50</text:p>
          </table:table-cell>
          <table:table-cell office:value-type="string" calcext:value-type="string">
            <text:p><text:a xlink:href="https://www.lcsc.com/product-detail/C191023.html" xlink:type="simple">https://www.lcsc.com/product-detail/C191023.html</text:a></text:p>
          </table:table-cell>
          <table:table-cell table:formula="of:=[.E18]*[.D18]"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JST S3B-PH-SM4-T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table:formula="of:=MAX([.B19];[.C19])" office:value-type="float" office:value="2" calcext:value-type="float">
            <text:p>2</text:p>
          </table:table-cell>
          <table:table-cell office:value-type="string" calcext:value-type="string">
            <text:p>https://www.digikey.com/en/products/detail/jst-sales-america-inc/S3B-PH-SM4-TB/926656</text:p>
          </table:table-cell>
          <table:table-cell table:formula="of:=[.E19]*[.D19]"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JST S2B-PH-SM4-T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055" calcext:value-type="float">
            <text:p>0.2055</text:p>
          </table:table-cell>
          <table:table-cell table:formula="of:=MAX([.B20];[.C20])" office:value-type="float" office:value="5" calcext:value-type="float">
            <text:p>5</text:p>
          </table:table-cell>
          <table:table-cell office:value-type="string" calcext:value-type="string">
            <text:p><text:a xlink:href="https://www.lcsc.com/product-detail/C295747.html" xlink:type="simple">https://www.lcsc.com/product-detail/C295747.html</text:a></text:p>
          </table:table-cell>
          <table:table-cell table:formula="of:=[.E20]*[.D20]" office:value-type="float" office:value="1.0275" calcext:value-type="float">
            <text:p>1.0275</text:p>
          </table:table-cell>
        </table:table-row>
        <table:table-row table:style-name="ro1">
          <table:table-cell office:value-type="string" calcext:value-type="string">
            <text:p>4.7nH induct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863" calcext:value-type="float">
            <text:p>0.0863</text:p>
          </table:table-cell>
          <table:table-cell table:formula="of:=MAX([.B21];[.C21])" office:value-type="float" office:value="5" calcext:value-type="float">
            <text:p>5</text:p>
          </table:table-cell>
          <table:table-cell office:value-type="string" calcext:value-type="string">
            <text:p><text:a xlink:href="https://www.lcsc.com/product-detail/C2043858.html" xlink:type="simple">https://www.lcsc.com/product-detail/C2043858.html</text:a></text:p>
          </table:table-cell>
          <table:table-cell table:formula="of:=[.E21]*[.D21]" office:value-type="float" office:value="0.4315" calcext:value-type="float">
            <text:p>0.4315</text:p>
          </table:table-cell>
        </table:table-row>
        <table:table-row table:style-name="ro1">
          <table:table-cell office:value-type="string" calcext:value-type="string">
            <text:p>2.2nH inducto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785" calcext:value-type="float">
            <text:p>0.0785</text:p>
          </table:table-cell>
          <table:table-cell table:formula="of:=MAX([.B22];[.C22])" office:value-type="float" office:value="10" calcext:value-type="float">
            <text:p>10</text:p>
          </table:table-cell>
          <table:table-cell office:value-type="string" calcext:value-type="string">
            <text:p><text:a xlink:href="https://www.lcsc.com/product-detail/C412264.html" xlink:type="simple">https://www.lcsc.com/product-detail/C412264.html</text:a></text:p>
          </table:table-cell>
          <table:table-cell table:formula="of:=[.E22]*[.D22]" office:value-type="float" office:value="0.785" calcext:value-type="float">
            <text:p>0.785</text:p>
          </table:table-cell>
        </table:table-row>
        <table:table-row table:style-name="ro1">
          <table:table-cell office:value-type="string" calcext:value-type="string">
            <text:p>10uH inducto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64" calcext:value-type="float">
            <text:p>0.0564</text:p>
          </table:table-cell>
          <table:table-cell table:formula="of:=MAX([.B23];[.C23])" office:value-type="float" office:value="10" calcext:value-type="float">
            <text:p>10</text:p>
          </table:table-cell>
          <table:table-cell office:value-type="string" calcext:value-type="string">
            <text:p><text:a xlink:href="https://www.lcsc.com/product-detail/C76798.html" xlink:type="simple">https://www.lcsc.com/product-detail/C76798.html</text:a></text:p>
          </table:table-cell>
          <table:table-cell table:formula="of:=[.E23]*[.D23]"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15nH inducto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666" calcext:value-type="float">
            <text:p>0.0666</text:p>
          </table:table-cell>
          <table:table-cell table:formula="of:=MAX([.B24];[.C24])" office:value-type="float" office:value="20" calcext:value-type="float">
            <text:p>20</text:p>
          </table:table-cell>
          <table:table-cell office:value-type="string" calcext:value-type="string">
            <text:p><text:a xlink:href="https://www.lcsc.com/product-detail/C98055.html" xlink:type="simple">https://www.lcsc.com/product-detail/C98055.html</text:a></text:p>
          </table:table-cell>
          <table:table-cell table:formula="of:=[.E24]*[.D24]" office:value-type="float" office:value="1.332" calcext:value-type="float">
            <text:p>1.332</text:p>
          </table:table-cell>
        </table:table-row>
        <table:table-row table:style-name="ro1">
          <table:table-cell office:value-type="string" calcext:value-type="string">
            <text:p>AO3401A (PMOS)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0371" calcext:value-type="float">
            <text:p>0.0371</text:p>
          </table:table-cell>
          <table:table-cell table:formula="of:=MAX([.B25];[.C25])" office:value-type="float" office:value="20" calcext:value-type="float">
            <text:p>20</text:p>
          </table:table-cell>
          <table:table-cell office:value-type="string" calcext:value-type="string">
            <text:p>https://www.lcsc.com/product-detail/C347476.html</text:p>
          </table:table-cell>
          <table:table-cell table:formula="of:=[.E25]*[.D25]" office:value-type="float" office:value="0.742" calcext:value-type="float">
            <text:p>0.742</text:p>
          </table:table-cell>
        </table:table-row>
        <table:table-row table:style-name="ro1">
          <table:table-cell office:value-type="string" calcext:value-type="string">
            <text:p>1M resistor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037" calcext:value-type="float">
            <text:p>0.0037</text:p>
          </table:table-cell>
          <table:table-cell table:formula="of:=MAX([.B26];[.C26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2907003.html" xlink:type="simple">https://www.lcsc.com/product-detail/C2907003.html</text:a></text:p>
          </table:table-cell>
          <table:table-cell table:formula="of:=[.E26]*[.D26]"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10k resistor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57" calcext:value-type="float">
            <text:p>0.0057</text:p>
          </table:table-cell>
          <table:table-cell table:formula="of:=MAX([.B27];[.C27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844918.html" xlink:type="simple">https://www.lcsc.com/product-detail/C844918.html</text:a></text:p>
          </table:table-cell>
          <table:table-cell table:formula="of:=[.E27]*[.D27]"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5.1k resistor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28" calcext:value-type="float">
            <text:p>0.0028</text:p>
          </table:table-cell>
          <table:table-cell table:formula="of:=MAX([.B28];[.C28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2907044.html" xlink:type="simple">https://www.lcsc.com/product-detail/C2907044.html</text:a></text:p>
          </table:table-cell>
          <table:table-cell table:formula="of:=[.E28]*[.D28]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100k resisto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25" calcext:value-type="float">
            <text:p>0.0025</text:p>
          </table:table-cell>
          <table:table-cell table:formula="of:=MAX([.B29];[.C29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2907088.html" xlink:type="simple">https://www.lcsc.com/product-detail/C2907088.html</text:a></text:p>
          </table:table-cell>
          <table:table-cell table:formula="of:=[.E29]*[.D29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300 resistor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29" calcext:value-type="float">
            <text:p>0.0029</text:p>
          </table:table-cell>
          <table:table-cell table:formula="of:=MAX([.B30];[.C30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2930092.html" xlink:type="simple">https://www.lcsc.com/product-detail/C2930092.html</text:a></text:p>
          </table:table-cell>
          <table:table-cell table:formula="of:=[.E30]*[.D30]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560k resisto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25" calcext:value-type="float">
            <text:p>0.0025</text:p>
          </table:table-cell>
          <table:table-cell table:formula="of:=MAX([.B31];[.C31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23203.html" xlink:type="simple">https://www.lcsc.com/product-detail/C23203.html</text:a></text:p>
          </table:table-cell>
          <table:table-cell table:formula="of:=[.E31]*[.D31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180k resisto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27" calcext:value-type="float">
            <text:p>0.0027</text:p>
          </table:table-cell>
          <table:table-cell table:formula="of:=MAX([.B32];[.C32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2906999.html" xlink:type="simple">https://www.lcsc.com/product-detail/C2906999.html</text:a></text:p>
          </table:table-cell>
          <table:table-cell table:formula="of:=[.E32]*[.D32]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TS-1088-AR02016 (pushbutton)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57" calcext:value-type="float">
            <text:p>0.0557</text:p>
          </table:table-cell>
          <table:table-cell table:formula="of:=MAX([.B33];[.C33])" office:value-type="float" office:value="10" calcext:value-type="float">
            <text:p>10</text:p>
          </table:table-cell>
          <table:table-cell office:value-type="string" calcext:value-type="string">
            <text:p>https://www.lcsc.com/product-detail/C720477.html</text:p>
          </table:table-cell>
          <table:table-cell table:formula="of:=[.E33]*[.D33]"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CHS-01B1 (slide switch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83" calcext:value-type="float">
            <text:p>0.7583</text:p>
          </table:table-cell>
          <table:table-cell table:formula="of:=MAX([.B34];[.C34])" office:value-type="float" office:value="1" calcext:value-type="float">
            <text:p>1</text:p>
          </table:table-cell>
          <table:table-cell office:value-type="string" calcext:value-type="string">
            <text:p><text:a xlink:href="https://www.lcsc.com/product-detail/C3312309.html" xlink:type="simple">https://www.lcsc.com/product-detail/C3312309.html</text:a></text:p>
          </table:table-cell>
          <table:table-cell table:formula="of:=[.E34]*[.D34]" office:value-type="float" office:value="0.7583" calcext:value-type="float">
            <text:p>0.7583</text:p>
          </table:table-cell>
        </table:table-row>
        <table:table-row table:style-name="ro1">
          <table:table-cell office:value-type="string" calcext:value-type="string">
            <text:p>NTC themisto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97" calcext:value-type="float">
            <text:p>0.0597</text:p>
          </table:table-cell>
          <table:table-cell table:formula="of:=MAX([.B35];[.C35])" office:value-type="float" office:value="10" calcext:value-type="float">
            <text:p>10</text:p>
          </table:table-cell>
          <table:table-cell office:value-type="string" calcext:value-type="string">
            <text:p>https://www.lcsc.com/product-detail/C3152998.html</text:p>
          </table:table-cell>
          <table:table-cell table:formula="of:=[.E35]*[.D35]"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nRF52840-QFAA-F-R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4" calcext:value-type="float">
            <text:p>6.54</text:p>
          </table:table-cell>
          <table:table-cell table:formula="of:=MAX([.B36];[.C36])" office:value-type="float" office:value="1" calcext:value-type="float">
            <text:p>1</text:p>
          </table:table-cell>
          <table:table-cell office:value-type="string" calcext:value-type="string">
            <text:p>https://www.digikey.com/en/products/detail/nordic-semiconductor-asa/NRF52840-QFAA-F-R7/15929801</text:p>
          </table:table-cell>
          <table:table-cell table:formula="of:=[.E36]*[.D36]" office:value-type="float" office:value="6.54" calcext:value-type="float">
            <text:p>6.54</text:p>
          </table:table-cell>
        </table:table-row>
        <table:table-row table:style-name="ro1">
          <table:table-cell office:value-type="string" calcext:value-type="string">
            <text:p>TP405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413" calcext:value-type="float">
            <text:p>0.0413</text:p>
          </table:table-cell>
          <table:table-cell table:formula="of:=MAX([.B37];[.C37])" office:value-type="float" office:value="10" calcext:value-type="float">
            <text:p>10</text:p>
          </table:table-cell>
          <table:table-cell office:value-type="string" calcext:value-type="string">
            <text:p>https://www.lcsc.com/product-detail/C725791.html</text:p>
          </table:table-cell>
          <table:table-cell table:formula="of:=[.E37]*[.D37]" office:value-type="float" office:value="0.413" calcext:value-type="float">
            <text:p>0.413</text:p>
          </table:table-cell>
        </table:table-row>
        <table:table-row table:style-name="ro1">
          <table:table-cell office:value-type="string" calcext:value-type="string">
            <text:p>TPS63051RMW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22" calcext:value-type="float">
            <text:p>1.022</text:p>
          </table:table-cell>
          <table:table-cell table:formula="of:=MAX([.B38];[.C38])" office:value-type="float" office:value="1" calcext:value-type="float">
            <text:p>1</text:p>
          </table:table-cell>
          <table:table-cell office:value-type="string" calcext:value-type="string">
            <text:p>https://www.lcsc.com/product-detail/C139412.html</text:p>
          </table:table-cell>
          <table:table-cell table:formula="of:=[.E38]*[.D38]" office:value-type="float" office:value="1.022" calcext:value-type="float">
            <text:p>1.022</text:p>
          </table:table-cell>
        </table:table-row>
        <table:table-row table:style-name="ro1">
          <table:table-cell office:value-type="string" calcext:value-type="string">
            <text:p>SN74LVC1G00DCKR (inverter)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299" calcext:value-type="float">
            <text:p>0.0299</text:p>
          </table:table-cell>
          <table:table-cell table:formula="of:=MAX([.B39];[.C39])" office:value-type="float" office:value="10" calcext:value-type="float">
            <text:p>10</text:p>
          </table:table-cell>
          <table:table-cell office:value-type="string" calcext:value-type="string">
            <text:p><text:a xlink:href="https://www.lcsc.com/product-detail/C19829626.html" xlink:type="simple">https://www.lcsc.com/product-detail/C19829626.html</text:a></text:p>
          </table:table-cell>
          <table:table-cell table:formula="of:=[.E39]*[.D39]" office:value-type="float" office:value="0.299" calcext:value-type="float">
            <text:p>0.2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AX([.B41];[.C41])" office:value-type="float" office:value="1" calcext:value-type="float">
            <text:p>1</text:p>
          </table:table-cell>
          <table:table-cell office:value-type="string" calcext:value-type="string">
            <text:p><text:a xlink:href="https://cart.jlcpcb.com/quote" xlink:type="simple">https://cart.jlcpcb.com/quote</text:a></text:p>
          </table:table-cell>
          <table:table-cell table:formula="of:=[.E41]*[.D41]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LCPCB shipping</text:p>
          </table:table-cell>
          <table:table-cell table:number-columns-repeated="5"/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LCSC shipping</text:p>
          </table:table-cell>
          <table:table-cell table:number-columns-repeated="5"/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string" calcext:value-type="string">
            <text:p>Digikey shipping</text:p>
          </table:table-cell>
          <table:table-cell table:number-columns-repeated="5"/>
          <table:table-cell table:style-name="ce2" office:value-type="currency" office:currency="USD" office:value="4.99" calcext:value-type="currency">
            <text:p>$4.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5"/>
          <table:table-cell table:formula="of:=SUM([.G2:.G46])" office:value-type="float" office:value="55.9992" calcext:value-type="float">
            <text:p>55.999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5"/>
          <table:table-cell table:formula="of:=[.G47]*1.0825" office:value-type="float" office:value="60.619134" calcext:value-type="float">
            <text:p>60.6191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Atkinson Hyperlegible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 style:data-style-name="N2" text:time-value="12:18:58.2869118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4T02:41:07.372150881</meta:creation-date>
    <dc:date>2026-06-30T13:29:55.776795266</dc:date>
    <meta:editing-duration>PT1H36M26S</meta:editing-duration>
    <meta:editing-cycles>16</meta:editing-cycles>
    <meta:generator>LibreOffice/25.8.7.3$Linux_X86_64 LibreOffice_project/580$Build-3</meta:generator>
    <meta:document-statistic meta:table-count="1" meta:cell-count="290" meta:object-count="0"/>
  </office:meta>
</office:document-meta>
</file>